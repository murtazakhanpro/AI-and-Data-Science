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right" style:justify-single-word="false" style:writing-mode="rl-tb" style:writing-mode-automatic="false"/>
      <style:text-properties fo:language="zxx" fo:country="none" style:language-asian="zxx" style:country-asian="none" style:language-complex="zxx" style:country-complex="none"/>
    </style:style>
    <style:style style:name="P2" style:family="paragraph" style:parent-style-name="Text_20_body" style:list-style-name="L1">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language-complex="zxx" style:country-complex="none"/>
    </style:style>
    <style:style style:name="P3" style:family="paragraph" style:parent-style-name="Heading_20_3">
      <style:paragraph-properties fo:margin-left="0in" fo:margin-right="0in" fo:margin-top="0in" fo:margin-bottom="0.0972in" style:contextual-spacing="false" fo:line-height="114%" fo:text-align="right" style:justify-single-word="false" fo:text-indent="0in" style:auto-text-indent="false"/>
      <style:text-properties fo:language="zxx" fo:country="none" style:language-asian="zxx" style:country-asian="none" style:language-complex="zxx" style:country-complex="none"/>
    </style:style>
    <style:style style:name="P4" style:family="paragraph" style:parent-style-name="Text_20_body" style:list-style-name="L2">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language-complex="zxx" style:country-complex="none"/>
    </style:style>
    <style:style style:name="P5" style:family="paragraph" style:parent-style-name="Text_20_body" style:list-style-name="L3">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language-complex="zxx" style:country-complex="none"/>
    </style:style>
    <style:style style:name="P6" style:family="paragraph" style:parent-style-name="Text_20_body">
      <style:paragraph-properties fo:text-align="right" style:justify-single-word="false" style:writing-mode="rl-tb" style:writing-mode-automatic="false"/>
      <style:text-properties fo:language="zxx" fo:country="none" style:language-asian="zxx" style:country-asian="none" style:language-complex="zxx" style:country-complex="none"/>
    </style:style>
    <style:style style:name="P7" style:family="paragraph" style:parent-style-name="Heading_20_1">
      <style:paragraph-properties fo:text-align="right" style:justify-single-word="false" style:writing-mode="rl-tb" style:writing-mode-automatic="false"/>
      <style:text-properties fo:language="zxx" fo:country="none" style:language-asian="zxx" style:country-asian="none" style:language-complex="zxx" style:country-complex="none"/>
    </style:style>
    <style:style style:name="P8" style:family="paragraph" style:parent-style-name="Heading_20_3">
      <style:paragraph-properties fo:margin-left="0in" fo:margin-right="0in" fo:margin-top="0in" fo:margin-bottom="0.0972in" style:contextual-spacing="false" fo:line-height="114%" fo:text-align="right" style:justify-single-word="false" fo:text-indent="0in" style:auto-text-indent="false" style:writing-mode="rl-tb" style:writing-mode-automatic="false"/>
      <style:text-properties fo:language="zxx" fo:country="none" style:language-asian="zxx" style:country-asian="none" style:language-complex="zxx" style:country-complex="none"/>
    </style:style>
    <style:style style:name="P9" style:family="paragraph" style:parent-style-name="Text_20_body" style:list-style-name="L4">
      <style:paragraph-properties fo:margin-left="0in" fo:margin-right="0in" fo:margin-top="0in" fo:margin-bottom="0.0972in" style:contextual-spacing="false" fo:line-height="114%" fo:text-align="right" style:justify-single-word="false" fo:text-indent="0in" style:auto-text-indent="false" fo:padding="0in" fo:border="none" style:writing-mode="rl-tb" style:writing-mode-automatic="false"/>
      <style:text-properties fo:language="zxx" fo:country="none" style:language-asian="zxx" style:country-asian="none" style:language-complex="zxx" style:country-complex="none"/>
    </style:style>
    <style:style style:name="P10" style:family="paragraph" style:parent-style-name="Text_20_body" style:list-style-name="L5">
      <style:paragraph-properties fo:margin-left="0in" fo:margin-right="0in" fo:margin-top="0in" fo:margin-bottom="0.0972in" style:contextual-spacing="false" fo:line-height="114%" fo:text-align="right" style:justify-single-word="false" fo:text-indent="0in" style:auto-text-indent="false" fo:padding="0in" fo:border="none" style:writing-mode="rl-tb" style:writing-mode-automatic="false"/>
      <style:text-properties fo:language="zxx" fo:country="none" officeooo:paragraph-rsid="001fd71a" style:language-asian="zxx" style:country-asian="none" style:font-name-complex="Google Sans Text" style:language-complex="zxx" style:country-complex="none"/>
    </style:style>
    <style:style style:name="P11" style:family="paragraph" style:parent-style-name="Text_20_body" style:list-style-name="L5">
      <style:paragraph-properties fo:margin-left="0in" fo:margin-right="0in" fo:margin-top="0in" fo:margin-bottom="0.0972in" style:contextual-spacing="false" fo:line-height="114%" fo:text-align="right" style:justify-single-word="false" fo:text-indent="0in" style:auto-text-indent="false" fo:padding="0in" fo:border="none" style:writing-mode="rl-tb" style:writing-mode-automatic="false"/>
      <style:text-properties fo:language="zxx" fo:country="none" officeooo:paragraph-rsid="001fd71a" style:language-asian="zxx" style:country-asian="none" style:language-complex="zxx" style:country-complex="none"/>
    </style:style>
    <style:style style:name="P12" style:family="paragraph" style:parent-style-name="Text_20_body" style:list-style-name="L5">
      <style:paragraph-properties fo:margin-left="0in" fo:margin-right="0in" fo:margin-top="0in" fo:margin-bottom="0.0972in" style:contextual-spacing="false" fo:line-height="114%" fo:text-align="right" style:justify-single-word="false" fo:text-indent="0in" style:auto-text-indent="false" fo:padding="0in" fo:border="none" style:writing-mode="rl-tb" style:writing-mode-automatic="false"/>
      <style:text-properties fo:language="zxx" fo:country="none" style:language-asian="zxx" style:country-asian="none" style:language-complex="zxx" style:country-complex="none"/>
    </style:style>
    <style:style style:name="P13" style:family="paragraph" style:parent-style-name="Text_20_body" style:list-style-name="L5">
      <style:paragraph-properties fo:margin-left="0in" fo:margin-right="0in" fo:margin-top="0in" fo:margin-bottom="0.0972in" style:contextual-spacing="false" fo:line-height="114%" fo:text-align="right" style:justify-single-word="false" fo:text-indent="0in" style:auto-text-indent="false" fo:padding="0in" fo:border="none" style:writing-mode="rl-tb" style:writing-mode-automatic="false"/>
      <style:text-properties fo:language="zxx" fo:country="none" style:language-asian="zxx" style:country-asian="none" style:font-name-complex="Google Sans Text" style:language-complex="zxx" style:country-complex="none"/>
    </style:style>
    <style:style style:name="P14" style:family="paragraph" style:parent-style-name="Standard">
      <style:paragraph-properties fo:text-align="right" style:justify-single-word="false" style:writing-mode="rl-tb" style:writing-mode-automatic="false"/>
      <style:text-properties fo:language="zxx" fo:country="none" style:language-asian="zxx" style:country-asian="none" style:language-complex="zxx" style:country-complex="none"/>
    </style:style>
    <style:style style:name="P15" style:family="paragraph" style:parent-style-name="Text_20_body" style:list-style-name="L6">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language-complex="zxx" style:country-complex="none"/>
    </style:style>
    <style:style style:name="P16" style:family="paragraph" style:parent-style-name="Text_20_body" style:list-style-name="L7">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font-name-complex="Google Sans Text" style:language-complex="zxx" style:country-complex="none"/>
    </style:style>
    <style:style style:name="P17" style:family="paragraph" style:parent-style-name="Text_20_body" style:list-style-name="L7">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language-complex="zxx" style:country-complex="none"/>
    </style:style>
    <style:style style:name="P18" style:family="paragraph" style:parent-style-name="Text_20_body" style:list-style-name="L8">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language-complex="zxx" style:country-complex="none"/>
    </style:style>
    <style:style style:name="P19" style:family="paragraph" style:parent-style-name="Text_20_body" style:list-style-name="L9">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font-name-complex="Google Sans Text" style:language-complex="zxx" style:country-complex="none"/>
    </style:style>
    <style:style style:name="P20" style:family="paragraph" style:parent-style-name="Text_20_body" style:list-style-name="L9">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language-complex="zxx" style:country-complex="none"/>
    </style:style>
    <style:style style:name="P21" style:family="paragraph" style:parent-style-name="Text_20_body" style:list-style-name="L10">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language-complex="zxx" style:country-complex="none"/>
    </style:style>
    <style:style style:name="P22" style:family="paragraph" style:parent-style-name="Text_20_body" style:list-style-name="L11">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font-name-complex="Google Sans Text" style:language-complex="zxx" style:country-complex="none"/>
    </style:style>
    <style:style style:name="P23" style:family="paragraph" style:parent-style-name="Text_20_body" style:list-style-name="L11">
      <style:paragraph-properties fo:margin-left="0in" fo:margin-right="0in" fo:margin-top="0in" fo:margin-bottom="0.0972in" style:contextual-spacing="false" fo:line-height="114%" fo:text-align="right" style:justify-single-word="false" fo:text-indent="0in" style:auto-text-indent="false" fo:padding="0in" fo:border="none"/>
      <style:text-properties fo:language="zxx" fo:country="none" style:language-asian="zxx" style:country-asian="none" style:language-complex="zxx" style:country-complex="none"/>
    </style:style>
    <style:style style:name="T1" style:family="text">
      <style:text-properties style:font-family-complex="'Google Sans', sans-serif"/>
    </style:style>
    <style:style style:name="T2" style:family="text">
      <style:text-properties fo:font-family="'Google Sans', sans-serif"/>
    </style:style>
    <style:style style:name="T3" style:family="text">
      <style:text-properties style:font-name-complex="Google Sans Text" style:font-weight-complex="bold"/>
    </style:style>
    <style:style style:name="T4" style:family="text">
      <style:text-properties style:font-name="Google Sans Text" fo:font-weight="bold"/>
    </style:style>
    <style:style style:name="T5" style:family="text">
      <style:text-properties style:font-name="Google Sans Text"/>
    </style:style>
    <style:style style:name="T6" style:family="text">
      <style:text-properties style:font-name-complex="Google Sans Text"/>
    </style:style>
    <style:style style:name="T7" style:family="text">
      <style:text-properties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ٹیر </text:span><text:span text:style-name="T2">1 (Must Study) - </text:span><text:span text:style-name="T1">پیپر کا </text:span><text:span text:style-name="T2">75% </text:span><text:span text:style-name="T1">حصہ</text:span></text:h>
      <text:list text:style-name="L1">
        <text:list-item>
          <text:p text:style-name="P2"><text:bookmark text:name="p-rc_ab8c9a45f388f8c8-125"/><text:span text:style-name="T3">اسباق کا خلاصہ و تشریح</text:span><text:span text:style-name="T4">:</text:span><text:span text:style-name="T5"> </text:span><text:span text:style-name="T6">سیرتِ محمدی کی جامعیت، قحط الرجال، عالم گیر کا انصاف، سویرے جو کل آنکھ میری کھلی۔ </text:span></text:p>
        </text:list-item>
        <text:list-item>
          <text:p text:style-name="P2"><text:bookmark text:name="p-rc_ab8c9a45f388f8c8-126"/><text:span text:style-name="T3">شاعری</text:span><text:span text:style-name="T4">:</text:span><text:span text:style-name="T5"> </text:span><text:span text:style-name="T6">حمد، نعت، چاند اور تارے </text:span><text:span text:style-name="T5">(</text:span><text:span text:style-name="T6">اقبال</text:span><text:span text:style-name="T5">)</text:span><text:span text:style-name="T6">۔ </text:span></text:p>
        </text:list-item>
        <text:list-item>
          <text:p text:style-name="P2"><text:bookmark text:name="p-rc_ab8c9a45f388f8c8-127"/><text:span text:style-name="T3">غزلیں</text:span><text:span text:style-name="T4">:</text:span><text:span text:style-name="T5"> </text:span><text:span text:style-name="T6">میر، غالب، مومن، ناصر کاظمی۔ </text:span></text:p>
        </text:list-item>
        <text:list-item>
          <text:p text:style-name="P2"><text:bookmark text:name="p-rc_ab8c9a45f388f8c8-128"/><text:span text:style-name="T3">قواعد</text:span><text:span text:style-name="T4">:</text:span><text:span text:style-name="T5"> </text:span><text:span text:style-name="T6">امدادی افعال، فعلِ معاون، رموزِ اوقاف </text:span><text:span text:style-name="T5">(</text:span><text:span text:style-name="T6">سکتہ، وقفہ، رابطہ</text:span><text:span text:style-name="T5">)</text:span><text:span text:style-name="T6">۔ </text:span></text:p>
        </text:list-item>
        <text:list-item>
          <text:p text:style-name="P2"><text:span text:style-name="T3">وقت</text:span><text:span text:style-name="T4">:</text:span><text:span text:style-name="T5"> 4 </text:span><text:span text:style-name="T6">دن۔</text:span></text:p>
        </text:list-item>
      </text:list>
      <text:h text:style-name="P3" text:outline-level="3">🟨 <text:span text:style-name="T1">ٹیر </text:span><text:span text:style-name="T2">2 (Should Study) - </text:span><text:span text:style-name="T1">پیپر کا </text:span><text:span text:style-name="T2">20% </text:span><text:span text:style-name="T1">حصہ</text:span></text:h>
      <text:list text:style-name="L2">
        <text:list-item>
          <text:p text:style-name="P4"><text:bookmark text:name="p-rc_ab8c9a45f388f8c8-129"/><text:span text:style-name="T3">اسباق</text:span><text:span text:style-name="T4">:</text:span><text:span text:style-name="T5"> </text:span><text:span text:style-name="T6">خوش طبعی، سحر ہونے تک، لاہور میں ادیبوں کی کالونی۔ </text:span></text:p>
        </text:list-item>
        <text:list-item>
          <text:p text:style-name="P4"><text:bookmark text:name="p-rc_ab8c9a45f388f8c8-130"/><text:span text:style-name="T3">شاعری</text:span><text:span text:style-name="T4">:</text:span><text:span text:style-name="T5"> </text:span><text:span text:style-name="T6">بدلی کا چاند </text:span><text:span text:style-name="T5">(</text:span><text:span text:style-name="T6">جوش</text:span><text:span text:style-name="T5">)</text:span><text:span text:style-name="T6">، دو بہرے شناساؤں کی ملاقات۔ </text:span></text:p>
        </text:list-item>
        <text:list-item>
          <text:p text:style-name="P4"><text:bookmark text:name="p-rc_ab8c9a45f388f8c8-131"/><text:span text:style-name="T3">انشا پردازی</text:span><text:span text:style-name="T4">:</text:span><text:span text:style-name="T5"> </text:span><text:span text:style-name="T6">درخواست نگاری </text:span><text:span text:style-name="T5">(</text:span><text:span text:style-name="T6">شہری مسائل</text:span><text:span text:style-name="T5">)</text:span><text:span text:style-name="T6">، خطوط۔ </text:span></text:p>
        </text:list-item>
        <text:list-item>
          <text:p text:style-name="P4"><text:span text:style-name="T3">وقت</text:span><text:span text:style-name="T4">:</text:span><text:span text:style-name="T5"> 2 </text:span><text:span text:style-name="T6">دن۔</text:span></text:p>
        </text:list-item>
      </text:list>
      <text:h text:style-name="P3" text:outline-level="3">🟥 <text:span text:style-name="T1">ٹیر </text:span><text:span text:style-name="T2">3 (Optional) - </text:span><text:span text:style-name="T1">صرف </text:span><text:span text:style-name="T2">5% </text:span><text:span text:style-name="T1">حصہ </text:span><text:span text:style-name="T2">(</text:span><text:span text:style-name="T1">صرف </text:span><text:span text:style-name="T2">MCQs </text:span><text:span text:style-name="T1">کے لیے</text:span><text:span text:style-name="T2">)</text:span></text:h>
      <text:list text:style-name="L3">
        <text:list-item>
          <text:p text:style-name="P5"><text:bookmark text:name="p-rc_ab8c9a45f388f8c8-132"/><text:span text:style-name="T3">موضوعات</text:span><text:span text:style-name="T4">:</text:span><text:span text:style-name="T5"> </text:span><text:span text:style-name="T6">داستان </text:span><text:span text:style-name="T5">(</text:span><text:span text:style-name="T6">چار مال دار</text:span><text:span text:style-name="T5">)</text:span><text:span text:style-name="T6">، نئے دور کی لڑکی، ہائیکو اور ثلاثی۔ </text:span></text:p>
        </text:list-item>
        <text:list-item>
          <text:p text:style-name="P5"><text:span text:style-name="T3">وقت</text:span><text:span text:style-name="T4">:</text:span><text:span text:style-name="T5"> 1 </text:span><text:span text:style-name="T6">دن۔</text:span></text:p>
        </text:list-item>
      </text:list>
      <text:p text:style-name="P6"/>
      <text:p text:style-name="P6"/>
      <text:p text:style-name="P6"/>
      <text:p text:style-name="P6"/>
      <text:p text:style-name="P6"/>
      <text:p text:style-name="P6"/>
      <text:h text:style-name="P7" text:outline-level="1"><text:soft-page-break/></text:h>
      <text:h text:style-name="P7" text:outline-level="1">📖 <text:span text:style-name="T1">سبق </text:span><text:span text:style-name="T2">1: </text:span><text:span text:style-name="T1">سیرتِ محمدی کی جامعیت </text:span><text:span text:style-name="T2">(</text:span><text:span text:style-name="T1">سید سلیمان ندوی</text:span><text:span text:style-name="T2">)</text:span></text:h>
      <text:h text:style-name="P8" text:outline-level="3">💡 <text:span text:style-name="T1">سبق کا آسان خلاصہ </text:span><text:span text:style-name="T2">(</text:span><text:span text:style-name="T1">پوائنٹس میں </text:span><text:span text:style-name="T2">- </text:span><text:span text:style-name="T1">صرف سمجھنے کے لیے</text:span><text:span text:style-name="T2">)</text:span></text:h>
      <text:list text:style-name="L4">
        <text:list-header>
          <text:p text:style-name="P9"><text:bookmark text:name="p-rc_62e2c4360eaffdc1-231"/><text:span text:style-name="T3">بنیادی اصول</text:span><text:span text:style-name="T4">:</text:span><text:span text:style-name="T5"> </text:span><text:span text:style-name="T6">دنیا میں ہر انسان </text:span><text:span text:style-name="T5">(</text:span><text:span text:style-name="T6">امیر، غریب، حکمران، استاد</text:span><text:span text:style-name="T5">) </text:span><text:span text:style-name="T6">کو زندگی گزارنے کے لیے ایک عملی نمونے </text:span><text:span text:style-name="T5">(Role Model) </text:span><text:span text:style-name="T6">کی ضرورت ہوتی ہے۔ </text:span></text:p>
          <text:p text:style-name="P9"><text:bookmark text:name="p-rc_62e2c4360eaffdc1-232"/><text:span text:style-name="T3">واحد ہستی</text:span><text:span text:style-name="T4">:</text:span><text:span text:style-name="T5"> </text:span><text:span text:style-name="T6">صرف حضرت محمد ﷺ کی ذات ایسی ہے جس میں کائنات کے ہر انسان کے لیے رہنمائی موجود ہے، اسی کو </text:span><text:span text:style-name="T5">"</text:span><text:span text:style-name="T6">جامعیت</text:span><text:span text:style-name="T5">" </text:span><text:span text:style-name="T6">کہتے ہیں۔ </text:span></text:p>
          <text:p text:style-name="P9"><text:bookmark text:name="p-rc_62e2c4360eaffdc1-233"/><text:span text:style-name="T3">مثالیں</text:span><text:span text:style-name="T4">:</text:span><text:span text:style-name="T5"> </text:span><text:span text:style-name="T6">مصنف نے ثابت کیا کہ آپ ﷺ مکہ میں تاجر بھی رہے، شعبِ ابی طالب میں غریب و مظلوم بھی رہے، مدینہ میں فاتح اور سپہ سالار بھی بنے، اور صفّہ میں استاد بھی بنے۔ </text:span></text:p>
          <text:p text:style-name="P9"><text:bookmark text:name="p-rc_62e2c4360eaffdc1-234"/><text:span text:style-name="T3">عدی بن حاتم کا واقعہ</text:span><text:span text:style-name="T4">:</text:span><text:span text:style-name="T5"> </text:span><text:span text:style-name="T6">عدی بن حاتم آپ ﷺ کا جلال دیکھ کر ڈر گئے تھے، لیکن جب انہوں نے دیکھا کہ آپ ﷺ ایک غریب لونڈی کی فریاد سننے کے لیے گلی میں کھڑے ہو گئے، تو وہ سمجھ گئے کہ یہ بادشاہت نہیں بلکہ نبوت ہے اور اسلام لے آئے۔ </text:span></text:p>
        </text:list-header>
      </text:list>
      <text:h text:style-name="P8" text:outline-level="3">✍️ <text:span text:style-name="T1">ون لائنر نوٹس </text:span><text:span text:style-name="T2">(Smart Keywords - </text:span><text:span text:style-name="T1">اب رجسٹر پر صرف یہ لکھو</text:span><text:span text:style-name="T2">!)</text:span></text:h>
      <text:list text:style-name="L5">
        <text:list-header>
          <text:p text:style-name="P10"><text:bookmark text:name="p-rc_62e2c4360eaffdc1-235"/><text:span text:style-name="T7">مصنف 👈</text:span> سید سلیمان ندوی </text:p>
        </text:list-header>
        <text:list-item>
          <text:p text:style-name="P11"><text:bookmark text:name="p-rc_62e2c4360eaffdc1-236"/><text:span text:style-name="T3">کتاب</text:span><text:span text:style-name="T4">/</text:span><text:span text:style-name="T3">ماخذ 👈</text:span><text:span text:style-name="T6"> خطباتِ مدراس </text:span></text:p>
        </text:list-item>
        <text:list-item>
          <text:p text:style-name="P12"><text:bookmark text:name="p-rc_62e2c4360eaffdc1-237"/><text:span text:style-name="T3">مرکزی خیال 👈</text:span><text:span text:style-name="T6"> آپ ﷺ کی ذات</text:span><text:span text:style-name="T5">: </text:span><text:span text:style-name="T6">ہر انسان کے لیے واحد مکمل عملی نمونہ </text:span></text:p>
        </text:list-item>
        <text:list-item>
          <text:p text:style-name="P12"><text:bookmark text:name="p-rc_62e2c4360eaffdc1-238"/><text:span text:style-name="T3">مالدار</text:span><text:span text:style-name="T4">/</text:span><text:span text:style-name="T3">تاجر 👈</text:span><text:span text:style-name="T6"> تاجرِ مکہ </text:span></text:p>
        </text:list-item>
        <text:list-item>
          <text:p text:style-name="P12"><text:bookmark text:name="p-rc_62e2c4360eaffdc1-239"/><text:span text:style-name="T3">غریب</text:span><text:span text:style-name="T4">/</text:span><text:span text:style-name="T3">مظلوم 👈</text:span><text:span text:style-name="T6"> شعبِ ابی طالب کے محصور </text:span></text:p>
        </text:list-item>
        <text:list-item>
          <text:p text:style-name="P12"><text:bookmark text:name="p-rc_62e2c4360eaffdc1-240"/><text:span text:style-name="T3">فاتح</text:span><text:span text:style-name="T4">/</text:span><text:span text:style-name="T3">سپہ سالار 👈</text:span><text:span text:style-name="T6"> بدر و حنین اور فتحِ مکہ </text:span></text:p>
        </text:list-item>
        <text:list-item>
          <text:p text:style-name="P12"><text:bookmark text:name="p-rc_62e2c4360eaffdc1-241"/><text:span text:style-name="T3">استاد</text:span><text:span text:style-name="T4">/</text:span><text:span text:style-name="T3">معلم 👈</text:span><text:span text:style-name="T6"> صفّہ کی درس گاہ </text:span></text:p>
        </text:list-item>
        <text:list-item>
          <text:p text:style-name="P12"><text:bookmark text:name="p-rc_62e2c4360eaffdc1-242"/><text:span text:style-name="T3">قاضی</text:span><text:span text:style-name="T4">/</text:span><text:span text:style-name="T3">منصف 👈</text:span><text:span text:style-name="T6"> حجرِ اسود کی ثالثی کا فیصلہ </text:span></text:p>
        </text:list-item>
        <text:list-item>
          <text:p text:style-name="P13"><text:bookmark text:name="p-rc_62e2c4360eaffdc1-243"/><text:span text:style-name="T7">کلیدی واقعہ 👈</text:span> عدی بن حاتم 👈 غریب لونڈی کی فریاد سننا 👈 نبوت کی دلیل </text:p>
        </text:list-item>
        <text:list-item>
          <text:p text:style-name="P12"><text:bookmark text:name="p-rc_62e2c4360eaffdc1-244"/><text:span text:style-name="T3">امتحانی کوٹیشن 👈</text:span><text:span text:style-name="T6"> دیگر انبیاء </text:span><text:span text:style-name="T5">= </text:span><text:span text:style-name="T6">ایک جنس کی دکان 👈 حضور ﷺ </text:span><text:span text:style-name="T5">= </text:span><text:span text:style-name="T6">اخلاق کا سب سے بڑا بازار </text:span></text:p>
        </text:list-item>
      </text:list>
      <text:p text:style-name="P14"/>
      <text:p text:style-name="P14"/>
      <text:p text:style-name="P14"/>
      <text:p text:style-name="P14"><text:soft-page-break/></text:p>
      <text:p text:style-name="P14"/>
      <text:p text:style-name="P14"/>
      <text:h text:style-name="P7" text:outline-level="1">📖 <text:span text:style-name="T1">سبق </text:span><text:span text:style-name="T2">2: </text:span><text:span text:style-name="T1">قحط الرجال </text:span><text:span text:style-name="T2">(</text:span><text:span text:style-name="T1">مختار مسعود</text:span><text:span text:style-name="T2">)</text:span></text:h>
      <text:h text:style-name="P3" text:outline-level="3">💡 <text:span text:style-name="T1">سبق کا آسان خلاصہ </text:span><text:span text:style-name="T2">(</text:span><text:span text:style-name="T1">پوائنٹس میں </text:span><text:span text:style-name="T2">- </text:span><text:span text:style-name="T1">صرف سمجھنے کے لیے</text:span><text:span text:style-name="T2">)</text:span></text:h>
      <text:list text:style-name="L6">
        <text:list-item>
          <text:p text:style-name="P15"><text:bookmark text:name="p-rc_44ee9dedaefe7d80-245"/><text:span text:style-name="T3">عنوان کا مطلب</text:span><text:span text:style-name="T4">:</text:span><text:span text:style-name="T5"> "</text:span><text:span text:style-name="T6">قحط الرجال</text:span><text:span text:style-name="T5">" </text:span><text:span text:style-name="T6">کا مطلب ہے مخلص، قابل اور بڑے انسانوں کا ختم ہو جانا </text:span><text:span text:style-name="T5">(</text:span><text:span text:style-name="T6">قحطِ آدمیت</text:span><text:span text:style-name="T5">)</text:span><text:span text:style-name="T6">۔ </text:span></text:p>
        </text:list-item>
        <text:list-item>
          <text:p text:style-name="P15"><text:bookmark text:name="p-rc_44ee9dedaefe7d80-246"/><text:span text:style-name="T3">موضوع</text:span><text:span text:style-name="T4">:</text:span><text:span text:style-name="T5"> </text:span><text:span text:style-name="T6">یہ ایک خاکہ </text:span><text:span text:style-name="T5">(</text:span><text:span text:style-name="T6">شخصیت نگاری</text:span><text:span text:style-name="T5">) </text:span><text:span text:style-name="T6">ہے، جس میں مصنف نے اپنے مخلص دوست اور پاکستان کے عظیم نامور ادیب </text:span><text:span text:style-name="T3">احمد شاہ پطرس بخاری</text:span><text:span text:style-name="T6"> کی زندگی اور شخصیت کو خراجِ تحسین پیش کیا ہے۔ </text:span></text:p>
        </text:list-item>
        <text:list-item>
          <text:p text:style-name="P15"><text:bookmark text:name="p-rc_44ee9dedaefe7d80-247"/><text:span text:style-name="T3">پطرس کی عظمت</text:span><text:span text:style-name="T4">:</text:span><text:span text:style-name="T5"> </text:span><text:span text:style-name="T6">پطرس بخاری انتہائی ذہین اور خوش مزاج انسان تھے۔ وہ اقوامِ متحدہ </text:span><text:span text:style-name="T5">(UN) </text:span><text:span text:style-name="T6">میں پاکستان کے مستقل نمائندے بھی رہے، جہاں انہوں نے اپنی قابلیت سے پاکستان کا نام روشن کیا۔ </text:span></text:p>
        </text:list-item>
        <text:list-item>
          <text:p text:style-name="P15"><text:bookmark text:name="p-rc_44ee9dedaefe7d80-248"/><text:span text:style-name="T3">مصنف کا دکھ</text:span><text:span text:style-name="T4">:</text:span><text:span text:style-name="T5"> </text:span><text:span text:style-name="T6">پطرس بخاری کی وفات پر مصنف بہت غمزدہ ہیں اور کہتے ہیں کہ اب زمین بانجھ ہو چکی ہے، ایسے قداور مخلص لوگ اب پیدا نہیں ہوتے اور دنیا میں قحط الرجال کا دور آ گیا ہے۔ </text:span></text:p>
        </text:list-item>
      </text:list>
      <text:h text:style-name="P3" text:outline-level="3">✍️ <text:span text:style-name="T1">ون لائنر نوٹس </text:span><text:span text:style-name="T2">(Smart Keywords - </text:span><text:span text:style-name="T1">اب رجسٹر پر صرف یہ لکھو</text:span><text:span text:style-name="T2">!)</text:span></text:h>
      <text:list text:style-name="L7">
        <text:list-item>
          <text:p text:style-name="P16"><text:bookmark text:name="p-rc_44ee9dedaefe7d80-249"/><text:span text:style-name="T7">مصنف 👈</text:span> مختار مسعود </text:p>
        </text:list-item>
        <text:list-item>
          <text:p text:style-name="P17"><text:bookmark text:name="p-rc_44ee9dedaefe7d80-250"/><text:span text:style-name="T3">صنفِ نثر 👈</text:span><text:span text:style-name="T6"> خاکہ نگاری </text:span><text:span text:style-name="T5">/ </text:span><text:span text:style-name="T6">شخصیت نگاری </text:span></text:p>
        </text:list-item>
        <text:list-item>
          <text:p text:style-name="P17"><text:bookmark text:name="p-rc_44ee9dedaefe7d80-251"/><text:span text:style-name="T3">عنوان کا مطلب 👈</text:span><text:span text:style-name="T6"> قحطِ آدمیت </text:span><text:span text:style-name="T5">/ </text:span><text:span text:style-name="T6">بڑے اور قابل لوگوں کی کمی </text:span></text:p>
        </text:list-item>
        <text:list-item>
          <text:p text:style-name="P17"><text:bookmark text:name="p-rc_44ee9dedaefe7d80-252"/><text:span text:style-name="T3">مرکزی ہستی 👈</text:span><text:span text:style-name="T6"> احمد شاہ پطرس بخاری </text:span><text:span text:style-name="T5">(</text:span><text:span text:style-name="T6">مصنف کے دوست</text:span><text:span text:style-name="T5">) </text:span></text:p>
        </text:list-item>
        <text:list-item>
          <text:p text:style-name="P17"><text:bookmark text:name="p-rc_44ee9dedaefe7d80-253"/><text:span text:style-name="T3">پطرس کا عہدہ 👈</text:span><text:span text:style-name="T6"> اقوامِ متحدہ </text:span><text:span text:style-name="T5">(UN) </text:span><text:span text:style-name="T6">میں پاکستان کے مستقل نمائندے </text:span></text:p>
        </text:list-item>
        <text:list-item>
          <text:p text:style-name="P17"><text:bookmark text:name="p-rc_44ee9dedaefe7d80-254"/><text:span text:style-name="T3">مقامِ ملاقات 👈</text:span><text:span text:style-name="T6"> لالہ زار </text:span><text:span text:style-name="T5">(</text:span><text:span text:style-name="T6">مصنف کا گھر</text:span><text:span text:style-name="T5">/</text:span><text:span text:style-name="T6">دفتر</text:span><text:span text:style-name="T5">) </text:span></text:p>
        </text:list-item>
        <text:list-item>
          <text:p text:style-name="P16"><text:bookmark text:name="p-rc_44ee9dedaefe7d80-255"/><text:span text:style-name="T7">بنیادی دکھ 👈</text:span> پطرس کی وفات 👈 اب ایسے قد آور انسان پیدا ہونا بند ہو گئے ہیں </text:p>
        </text:list-item>
        <text:list-item>
          <text:p text:style-name="P16"><text:bookmark text:name="p-rc_44ee9dedaefe7d80-256"/><text:span text:style-name="T7">امتحانی کوٹیشن 👈</text:span> زمین بانجھ ہو گئی ہے 👈 اب قحطِ رجال کا دور ہے </text:p>
        </text:list-item>
      </text:list>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h text:style-name="P7" text:outline-level="1">📖 <text:span text:style-name="T1">سبق </text:span><text:span text:style-name="T2">3: </text:span><text:span text:style-name="T1">عالم گیر کا انصاف </text:span><text:span text:style-name="T2">(</text:span><text:span text:style-name="T1">علامہ شبلی نعمانی</text:span><text:span text:style-name="T2">)</text:span></text:h>
      <text:h text:style-name="P3" text:outline-level="3">💡 <text:span text:style-name="T1">سبق کا آسان خلاصہ </text:span><text:span text:style-name="T2">(</text:span><text:span text:style-name="T1">پوائنٹس میں </text:span><text:span text:style-name="T2">- </text:span><text:span text:style-name="T1">صرف سمجھنے کے لیے</text:span><text:span text:style-name="T2">)</text:span></text:h>
      <text:list text:style-name="L8">
        <text:list-item>
          <text:p text:style-name="P18"><text:bookmark text:name="p-rc_9ae39fa6e6aa198b-257"/><text:span text:style-name="T3">اورنگزیب عالم گیر کا تعارف</text:span><text:span text:style-name="T4">:</text:span><text:span text:style-name="T5"> </text:span><text:span text:style-name="T6">مغل شہنشاہ اورنگزیب عالم گیر اپنے رعب اور جاہ و جلال کے لیے جانے جاتے تھے، لیکن عدل و انصاف کے معاملے میں وہ بہت سخت تھے اور قانون کو سب سے اوپر رکھتے تھے۔ </text:span></text:p>
        </text:list-item>
        <text:list-item>
          <text:p text:style-name="P18"><text:bookmark text:name="p-rc_9ae39fa6e6aa198b-258"/><text:span text:style-name="T3">بوڑھی عورت کا مقدمہ</text:span><text:span text:style-name="T4">:</text:span><text:span text:style-name="T5"> </text:span><text:span text:style-name="T6">ایک غریب بوڑھی عورت شاہی عدالت میں آتی ہے اور دہائی دیتی ہے کہ شاہی فوج کے ایک ہاتھی نے اس کے اکلوتے جوان بیٹے کو کچل کر مار ڈالا ہے۔ </text:span></text:p>
        </text:list-item>
        <text:list-item>
          <text:p text:style-name="P18"><text:bookmark text:name="p-rc_9ae39fa6e6aa198b-259"/><text:span text:style-name="T3">قانون کی بالادستی</text:span><text:span text:style-name="T4">:</text:span><text:span text:style-name="T5"> </text:span><text:span text:style-name="T6">عالم گیر کسی دباؤ یا شاہی رعب میں آئے بغیر مقدمے کی باقاعدہ تفتیش کرواتے ہیں اور معاملہ قاضی </text:span><text:span text:style-name="T5">(</text:span><text:span text:style-name="T6">جج</text:span><text:span text:style-name="T5">) </text:span><text:span text:style-name="T6">کی عدالت میں بھیج دیتے ہیں۔ </text:span></text:p>
        </text:list-item>
        <text:list-item>
          <text:p text:style-name="P18"><text:bookmark text:name="p-rc_9ae39fa6e6aa198b-260"/><text:span text:style-name="T3">آزاد عدالتی نظام</text:span><text:span text:style-name="T4">:</text:span><text:span text:style-name="T5"> </text:span><text:span text:style-name="T6">قاضی کی عدالت مغل دور میں اتنی آزاد تھی کہ بادشاہ بھی قانون کے سامنے ایک عام شہری کی طرح کھڑا ہوتا تھا۔ عورت کو اس کا پورا حق </text:span><text:span text:style-name="T5">(</text:span><text:span text:style-name="T6">خون بہا</text:span><text:span text:style-name="T5">/</text:span><text:span text:style-name="T6">دیت</text:span><text:span text:style-name="T5">) </text:span><text:span text:style-name="T6">ملتا ہے اور اورنگزیب ثابت کرتے ہیں کہ انصاف سب کے لیے برابر ہے۔ </text:span></text:p>
        </text:list-item>
      </text:list>
      <text:h text:style-name="P3" text:outline-level="3">✍️ <text:span text:style-name="T1">ون لائنر نوٹس </text:span><text:span text:style-name="T2">(Smart Keywords - </text:span><text:span text:style-name="T1">اب رجسٹر پر صرف یہ لکھو</text:span><text:span text:style-name="T2">!)</text:span></text:h>
      <text:list text:style-name="L9">
        <text:list-item>
          <text:p text:style-name="P19"><text:bookmark text:name="p-rc_9ae39fa6e6aa198b-261"/><text:span text:style-name="T7">مصنف 👈</text:span> علامہ شبلی نعمانی </text:p>
        </text:list-item>
        <text:list-item>
          <text:p text:style-name="P19"><text:bookmark text:name="p-rc_9ae39fa6e6aa198b-262"/><text:span text:style-name="T7">مرکزی موضوع 👈</text:span> اورنگزیب عالم گیر کا بے لاگ انصاف اور قانون کی بالادستی </text:p>
        </text:list-item>
        <text:list-item>
          <text:p text:style-name="P19"><text:bookmark text:name="p-rc_9ae39fa6e6aa198b-263"/><text:span text:style-name="T7">فریادی 👈</text:span> ایک غریب، بے بس بوڑھی عورت </text:p>
        </text:list-item>
        <text:list-item>
          <text:p text:style-name="P20"><text:bookmark text:name="p-rc_9ae39fa6e6aa198b-264"/><text:span text:style-name="T3">جرم</text:span><text:span text:style-name="T4">/</text:span><text:span text:style-name="T3">واقعہ 👈</text:span><text:span text:style-name="T6"> شاہی ہاتھی کے پاؤں تلے بوڑھی عورت کے جوان بیٹے کا کچل جانا </text:span></text:p>
        </text:list-item>
        <text:list-item>
          <text:p text:style-name="P20"><text:bookmark text:name="p-rc_9ae39fa6e6aa198b-265"/><text:span text:style-name="T3">بادشاہ کا اصول 👈</text:span><text:span text:style-name="T6"> عدل و انصاف میں شاہ و گدا </text:span><text:span text:style-name="T5">(</text:span><text:span text:style-name="T6">بادشاہ اور فقیر</text:span><text:span text:style-name="T5">) </text:span><text:span text:style-name="T6">برابر </text:span></text:p>
        </text:list-item>
        <text:list-item>
          <text:p text:style-name="P19"><text:bookmark text:name="p-rc_9ae39fa6e6aa198b-266"/><text:span text:style-name="T7">مغل عدالتی نظام 👈</text:span> قاضی کی عدالت مکمل آزاد، بادشاہ بھی قانون کے تابع </text:p>
        </text:list-item>
        <text:list-item>
          <text:p text:style-name="P20"><text:bookmark text:name="p-rc_9ae39fa6e6aa198b-267"/><text:span text:style-name="T3">نتیجہ</text:span><text:span text:style-name="T4">/</text:span><text:span text:style-name="T3">فیصلہ 👈</text:span><text:span text:style-name="T6"> غریب عورت کو مکمل انصاف اور دیت </text:span><text:span text:style-name="T5">(</text:span><text:span text:style-name="T6">خون بہا</text:span><text:span text:style-name="T5">) </text:span><text:span text:style-name="T6">کی ادائیگی </text:span></text:p>
        </text:list-item>
        <text:list-item>
          <text:p text:style-name="P19"><text:bookmark text:name="p-rc_9ae39fa6e6aa198b-268"/><text:span text:style-name="T7">امتحانی کوٹیشن 👈</text:span> حکومت کفر سے چل سکتی ہے، لیکن ظلم سے نہیں </text:p>
        </text:list-item>
      </text:list>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h text:style-name="P7" text:outline-level="1">📖 <text:span text:style-name="T1">سبق </text:span><text:span text:style-name="T2">4: </text:span><text:span text:style-name="T1">سویرے جو کل آنکھ میری کھلی </text:span><text:span text:style-name="T2">(</text:span><text:span text:style-name="T1">پطرس بخاری</text:span><text:span text:style-name="T2">)</text:span></text:h>
      <text:h text:style-name="P3" text:outline-level="3">💡 <text:span text:style-name="T1">سبق کا آسان خلاصہ </text:span><text:span text:style-name="T2">(</text:span><text:span text:style-name="T1">پوائنٹس میں </text:span><text:span text:style-name="T2">- </text:span><text:span text:style-name="T1">صرف سمجھنے کے لیے</text:span><text:span text:style-name="T2">)</text:span></text:h>
      <text:list text:style-name="L10">
        <text:list-item>
          <text:p text:style-name="P21"><text:bookmark text:name="p-rc_f6e218a71a25cd6c-269"/><text:span text:style-name="T3">امتحان کی ٹینشن</text:span><text:span text:style-name="T4">:</text:span><text:span text:style-name="T5"> </text:span><text:span text:style-name="T6">مصنف </text:span><text:span text:style-name="T5">(</text:span><text:span text:style-name="T6">پطرس بخاری</text:span><text:span text:style-name="T5">) </text:span><text:span text:style-name="T6">کے امتحانات سر پر ہیں اور وہ پڑھائی کے لیے صبح جلدی اٹھنے کا ایک زبردست مائنڈ پلان بناتے ہیں </text:span><text:span text:style-name="T5">(</text:span><text:span text:style-name="T6">بالکل تمہاری موجودہ سچویشن کی طرح</text:span><text:span text:style-name="T5">!)</text:span><text:span text:style-name="T6">۔ </text:span></text:p>
        </text:list-item>
        <text:list-item>
          <text:p text:style-name="P21"><text:bookmark text:name="p-rc_f6e218a71a25cd6c-270"/><text:span text:style-name="T3">مدد کی اپیل</text:span><text:span text:style-name="T4">:</text:span><text:span text:style-name="T5"> </text:span><text:span text:style-name="T6">وہ اپنے پڑوسی </text:span><text:span text:style-name="T5">"</text:span><text:span text:style-name="T6">لالا سدھو</text:span><text:span text:style-name="T5">" </text:span><text:span text:style-name="T6">سے منتیں کرتے ہیں کہ بھائی، مجھے صبح تڑکے </text:span><text:span text:style-name="T5">4 </text:span><text:span text:style-name="T6">بجے ہر قیمت پر جگا دینا، چاہے میں جتنا بھی غصہ کروں یا کمبل نہ چھوڑوں۔ </text:span></text:p>
        </text:list-item>
        <text:list-item>
          <text:p text:style-name="P21"><text:bookmark text:name="p-rc_f6e218a71a25cd6c-271"/><text:span text:style-name="T3">صبح کا ہنگامہ</text:span><text:span text:style-name="T4">:</text:span><text:span text:style-name="T5"> </text:span><text:span text:style-name="T6">لالا سدھو سچ مچ صبح </text:span><text:span text:style-name="T5">4 </text:span><text:span text:style-name="T6">بجے آ کر دروازے پر وہ دھماکے دار دستک دیتے ہیں کہ مصنف کی نیند غارت ہو جاتی ہے۔ مصنف اٹھنے کے بجائے دل ہی دل میں لالا کو کوستے ہیں اور غصے میں کمبل تان کر دوبارہ سو جاتے ہیں۔ </text:span></text:p>
        </text:list-item>
        <text:list-item>
          <text:p text:style-name="P21"><text:bookmark text:name="p-rc_f6e218a71a25cd6c-272"/><text:span text:style-name="T3">طنز و مزاح کا نچوڑ</text:span><text:span text:style-name="T4">:</text:span><text:span text:style-name="T5"> </text:span><text:span text:style-name="T6">پطرس بخاری نے اس مضمون میں ان طلبہ کی نفسیات پر طنز کیا ہے جو سارا سال تو آرام کرتے ہیں اور امتحانات کے دنوں میں صبح جلدی اٹھ کر پڑھنے کے بڑے بڑے جھوٹے منصوبے بناتے ہیں، لیکن عمل صفر ہوتا ہے۔ </text:span></text:p>
        </text:list-item>
      </text:list>
      <text:h text:style-name="P3" text:outline-level="3">✍️ <text:span text:style-name="T1">ون لائنر نوٹس </text:span><text:span text:style-name="T2">(Smart Keywords - </text:span><text:span text:style-name="T1">اب رجسٹر پر صرف یہ لکھو</text:span><text:span text:style-name="T2">!)</text:span></text:h>
      <text:list text:style-name="L11">
        <text:list-item>
          <text:p text:style-name="P22"><text:bookmark text:name="p-rc_f6e218a71a25cd6c-273"/><text:span text:style-name="T7">مصنف 👈</text:span> احمد شاہ پطرس بخاری </text:p>
        </text:list-item>
        <text:list-item>
          <text:p text:style-name="P23"><text:bookmark text:name="p-rc_f6e218a71a25cd6c-274"/><text:span text:style-name="T3">صنفِ نثر 👈</text:span><text:span text:style-name="T6"> طنز و مزاح </text:span><text:span text:style-name="T5">/ </text:span><text:span text:style-name="T6">انشائیہ </text:span></text:p>
        </text:list-item>
        <text:list-item>
          <text:p text:style-name="P22"><text:bookmark text:name="p-rc_f6e218a71a25cd6c-275"/><text:span text:style-name="T7">مرکزی خیال 👈</text:span> طلبہ کا امتحانات کے دنوں میں صبح جلدی اٹھنے کے کھوکھلے منصوبے بنانا </text:p>
        </text:list-item>
        <text:list-item>
          <text:p text:style-name="P23"><text:bookmark text:name="p-rc_f6e218a71a25cd6c-276"/><text:span text:style-name="T3">مددگار کردار 👈</text:span><text:span text:style-name="T6"> لالا سدھو </text:span><text:span text:style-name="T5">(</text:span><text:span text:style-name="T6">پڑوسی جو صبح جگانے کی ڈیوٹی لیتا ہے</text:span><text:span text:style-name="T5">) </text:span></text:p>
        </text:list-item>
        <text:list-item>
          <text:p text:style-name="P23"><text:bookmark text:name="p-rc_f6e218a71a25cd6c-277"/><text:span text:style-name="T3">وقتِ بیداری 👈</text:span><text:span text:style-name="T6"> صبح کے ٹھیک </text:span><text:span text:style-name="T5">4 </text:span><text:span text:style-name="T6">بجے </text:span></text:p>
        </text:list-item>
        <text:list-item>
          <text:p text:style-name="P22"><text:bookmark text:name="p-rc_f6e218a71a25cd6c-278"/><text:span text:style-name="T7">مصنف کا ردِعمل 👈</text:span> جاگنے کے بجائے لالا کو گالیاں دینا اور کمبل میں منہ چھپانا </text:p>
        </text:list-item>
        <text:list-item>
          <text:p text:style-name="P23"><text:bookmark text:name="p-rc_f6e218a71a25cd6c-279"/><text:span text:style-name="T3">امتحانی کوٹیشن 👈</text:span><text:span text:style-name="T6"> </text:span><text:span text:style-name="T5">"</text:span><text:span text:style-name="T6">کون کہتا ہے کہ موت آئے گی تو سو نہ سکیں گے؟</text:span><text:span text:style-name="T5">" </text:span></text:p>
        </text:list-item>
      </text:list>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29T02:42:41.751310610</meta:creation-date>
    <dc:date>2026-06-29T02:54:05.817253304</dc:date>
    <meta:editing-duration>PT11M25S</meta:editing-duration>
    <meta:editing-cycles>1</meta:editing-cycles>
    <meta:document-statistic meta:table-count="0" meta:image-count="0" meta:object-count="0" meta:page-count="5" meta:paragraph-count="75" meta:word-count="1265" meta:character-count="5643" meta:non-whitespace-character-count="4456"/>
    <meta:generator>LibreOffice/26.2.4.2$Linux_X86_64 LibreOffice_project/3346a99e6b841765b75a9b29714a5b95c6761ce3</meta:generator>
  </office:meta>
</office:document-meta>
</file>