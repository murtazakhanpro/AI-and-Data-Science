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ejaVu Sans" svg:font-family="'DejaVu Sans'"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1">
      <style:paragraph-properties fo:text-align="right" style:justify-single-word="false" style:writing-mode="rl-tb" style:writing-mode-automatic="false"/>
      <style:text-properties style:font-name="DejaVu Sans" fo:font-size="14pt" fo:language="zxx" fo:country="none" style:font-size-asian="14pt" style:language-asian="zxx" style:country-asian="none" style:font-size-complex="14pt" style:language-complex="zxx" style:country-complex="none"/>
    </style:style>
    <style:style style:name="P2" style:family="paragraph" style:parent-style-name="Heading_20_2">
      <style:paragraph-properties fo:margin-top="0in" fo:margin-bottom="0.0972in" style:contextual-spacing="false" fo:line-height="115%" fo:text-align="right" style:justify-single-word="false"/>
      <style:text-properties style:font-name="DejaVu Sans" fo:font-size="14pt" fo:language="zxx" fo:country="none" style:font-size-asian="14pt" style:language-asian="zxx" style:country-asian="none" style:font-size-complex="14pt" style:language-complex="zxx" style:country-complex="none"/>
    </style:style>
    <style:style style:name="P3" style:family="paragraph" style:parent-style-name="Text_20_body">
      <style:paragraph-properties fo:text-align="right" style:justify-single-word="false"/>
      <style:text-properties style:font-name="DejaVu Sans" fo:font-size="14pt" fo:language="zxx" fo:country="none" style:font-size-asian="14pt" style:language-asian="zxx" style:country-asian="none" style:font-size-complex="14pt" style:language-complex="zxx" style:country-complex="none"/>
    </style:style>
    <style:style style:name="P4" style:family="paragraph" style:parent-style-name="Text_20_body" style:list-style-name="L1">
      <style:paragraph-properties fo:text-align="right" style:justify-single-word="false"/>
      <style:text-properties style:font-name="DejaVu Sans" fo:font-size="14pt" fo:language="zxx" fo:country="none" style:font-size-asian="14pt" style:language-asian="zxx" style:country-asian="none" style:font-size-complex="14pt" style:language-complex="zxx" style:country-complex="none"/>
    </style:style>
    <style:style style:name="P5" style:family="paragraph" style:parent-style-name="Heading_20_3">
      <style:paragraph-properties fo:margin-top="0in" fo:margin-bottom="0.0972in" style:contextual-spacing="false" fo:line-height="115%" fo:text-align="right" style:justify-single-word="false"/>
      <style:text-properties style:font-name="DejaVu Sans" fo:language="zxx" fo:country="none" style:language-asian="zxx" style:country-asian="none" style:language-complex="zxx" style:country-complex="none"/>
    </style:style>
    <style:style style:name="P6" style:family="paragraph" style:parent-style-name="Text_20_body" style:list-style-name="L2">
      <style:paragraph-properties fo:text-align="right" style:justify-single-word="false"/>
      <style:text-properties style:font-name="DejaVu Sans" fo:font-size="14pt" fo:language="zxx" fo:country="none" style:font-size-asian="14pt" style:language-asian="zxx" style:country-asian="none" style:font-size-complex="14pt" style:language-complex="zxx" style:country-complex="none"/>
    </style:style>
    <style:style style:name="P7" style:family="paragraph" style:parent-style-name="Text_20_body" style:list-style-name="L3">
      <style:paragraph-properties fo:text-align="right" style:justify-single-word="false"/>
      <style:text-properties style:font-name="DejaVu Sans" fo:font-size="14pt" fo:language="zxx" fo:country="none" style:font-size-asian="14pt" style:language-asian="zxx" style:country-asian="none" style:font-size-complex="14pt" style:language-complex="zxx" style:country-complex="none"/>
    </style:style>
    <style:style style:name="P8" style:family="paragraph" style:parent-style-name="Text_20_body" style:list-style-name="L4">
      <style:paragraph-properties fo:text-align="right" style:justify-single-word="false"/>
      <style:text-properties style:font-name="DejaVu Sans" fo:font-size="14pt" fo:language="zxx" fo:country="none" style:font-size-asian="14pt" style:language-asian="zxx" style:country-asian="none" style:font-size-complex="14pt" style:language-complex="zxx" style:country-complex="none"/>
    </style:style>
    <style:style style:name="P9" style:family="paragraph" style:parent-style-name="Text_20_body" style:list-style-name="L5">
      <style:paragraph-properties fo:text-align="right" style:justify-single-word="false"/>
      <style:text-properties style:font-name="DejaVu Sans" fo:font-size="14pt" fo:language="zxx" fo:country="none" style:font-size-asian="14pt" style:language-asian="zxx" style:country-asian="none" style:font-size-complex="14pt" style:language-complex="zxx" style:country-complex="none"/>
    </style:style>
    <style:style style:name="P10" style:family="paragraph" style:parent-style-name="Text_20_body" style:list-style-name="L6">
      <style:paragraph-properties fo:text-align="right" style:justify-single-word="false"/>
      <style:text-properties style:font-name="DejaVu Sans" fo:font-size="14pt" fo:language="zxx" fo:country="none" style:font-size-asian="14pt" style:language-asian="zxx" style:country-asian="none" style:font-size-complex="14pt" style:language-complex="zxx" style:country-complex="none"/>
    </style:style>
    <style:style style:name="P11" style:family="paragraph" style:parent-style-name="Text_20_body" style:list-style-name="L7">
      <style:paragraph-properties fo:text-align="right" style:justify-single-word="false"/>
      <style:text-properties style:font-name="DejaVu Sans" fo:font-size="14pt" fo:language="zxx" fo:country="none" style:font-size-asian="14pt" style:language-asian="zxx" style:country-asian="none" style:font-size-complex="14pt" style:language-complex="zxx" style:country-complex="none"/>
    </style:style>
    <style:style style:name="P12" style:family="paragraph" style:parent-style-name="Text_20_body" style:list-style-name="L8">
      <style:paragraph-properties fo:text-align="right" style:justify-single-word="false"/>
      <style:text-properties style:font-name="DejaVu Sans" fo:font-size="14pt" fo:language="zxx" fo:country="none" style:font-size-asian="14pt" style:language-asian="zxx" style:country-asian="none" style:font-size-complex="14pt" style:language-complex="zxx" style:country-complex="none"/>
    </style:style>
    <style:style style:name="P13" style:family="paragraph" style:parent-style-name="Text_20_body" style:list-style-name="L9">
      <style:paragraph-properties fo:text-align="right" style:justify-single-word="false"/>
      <style:text-properties style:font-name="DejaVu Sans" fo:font-size="14pt" fo:language="zxx" fo:country="none" style:font-size-asian="14pt" style:language-asian="zxx" style:country-asian="none" style:font-size-complex="14pt" style:language-complex="zxx" style:country-complex="none"/>
    </style:style>
    <style:style style:name="P14" style:family="paragraph" style:parent-style-name="Text_20_body" style:list-style-name="L10">
      <style:paragraph-properties fo:text-align="right" style:justify-single-word="false"/>
      <style:text-properties style:font-name="DejaVu Sans" fo:font-size="14pt" fo:language="zxx" fo:country="none" style:font-size-asian="14pt" style:language-asian="zxx" style:country-asian="none" style:font-size-complex="14pt" style:language-complex="zxx" style:country-complex="none"/>
    </style:style>
    <style:style style:name="P15" style:family="paragraph" style:parent-style-name="Text_20_body" style:list-style-name="L11">
      <style:paragraph-properties fo:text-align="right" style:justify-single-word="false"/>
      <style:text-properties style:font-name="DejaVu Sans" fo:font-size="14pt" fo:language="zxx" fo:country="none" style:font-size-asian="14pt" style:language-asian="zxx" style:country-asian="none" style:font-size-complex="14pt" style:language-complex="zxx" style:country-complex="none"/>
    </style:style>
    <style:style style:name="P16" style:family="paragraph" style:parent-style-name="Text_20_body" style:list-style-name="L12">
      <style:paragraph-properties fo:text-align="right" style:justify-single-word="false"/>
      <style:text-properties style:font-name="DejaVu Sans" fo:font-size="14pt" fo:language="zxx" fo:country="none" style:font-size-asian="14pt" style:language-asian="zxx" style:country-asian="none" style:font-size-complex="14pt" style:language-complex="zxx" style:country-complex="none"/>
    </style:style>
    <style:style style:name="P17" style:family="paragraph" style:parent-style-name="Text_20_body" style:list-style-name="L13">
      <style:paragraph-properties fo:text-align="right" style:justify-single-word="false"/>
      <style:text-properties style:font-name="DejaVu Sans" fo:font-size="14pt" fo:language="zxx" fo:country="none" style:font-size-asian="14pt" style:language-asian="zxx" style:country-asian="none" style:font-size-complex="14pt" style:language-complex="zxx" style:country-complex="none"/>
    </style:style>
    <style:style style:name="P18" style:family="paragraph" style:parent-style-name="Text_20_body" style:list-style-name="L14">
      <style:paragraph-properties fo:text-align="right" style:justify-single-word="false"/>
      <style:text-properties style:font-name="DejaVu Sans" fo:font-size="14pt" fo:language="zxx" fo:country="none" style:font-size-asian="14pt" style:language-asian="zxx" style:country-asian="none" style:font-size-complex="14pt" style:language-complex="zxx" style:country-complex="none"/>
    </style:style>
    <style:style style:name="P19" style:family="paragraph" style:parent-style-name="Text_20_body">
      <style:paragraph-properties fo:text-align="right" style:justify-single-word="false" style:writing-mode="rl-tb" style:writing-mode-automatic="false"/>
      <style:text-properties style:font-name="DejaVu Sans" fo:font-size="14pt" fo:language="zxx" fo:country="none" style:font-size-asian="14pt" style:language-asian="zxx" style:country-asian="none" style:font-size-complex="14pt" style:language-complex="zxx" style:country-complex="none"/>
    </style:style>
    <style:style style:name="T1" style:family="text">
      <style:text-properties style:font-weight-complex="bold"/>
    </style:style>
    <style:style style:name="T2" style:family="text">
      <style:text-properties fo:font-weight="bol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انٹرماڈیٹ کامرس پارٹ II - اردو لازمی (کراچی بورڈ)</text:h>
      <text:h text:style-name="P2" text:outline-level="2">امتحانی کریش کورس نوٹس (فائنل دہرائی کے لیے)</text:h>
      <text:h text:style-name="P2" text:outline-level="2">حصہ اول: کثیر الانتخابی سوالات (MCQs) اور مختصر جوابات کی چابی</text:h>
      <text:p text:style-name="P3">پرچے کے پہلے حصے اور مختصر سوالات کے پورے نمبر پکے کرنے کے لیے یہ جدول (Table) ذہن میں سیو کر لیں:</text:p>
      <text:list text:style-name="L1">
        <text:list-item>
          <text:p text:style-name="P4"><text:span text:style-name="T1">سبق </text:span><text:span text:style-name="T2">1:</text:span> سیرتِ محمدی کی جامعیت</text:p>
          <text:list>
            <text:list-item>
              <text:p text:style-name="P4"><text:span text:style-name="T1">مصنف</text:span><text:span text:style-name="T2">:</text:span> سید سلیمان ندوی</text:p>
            </text:list-item>
            <text:list-item>
              <text:p text:style-name="P4"><text:span text:style-name="T1">ماخذ</text:span><text:span text:style-name="T2">/</text:span><text:span text:style-name="T1">کتاب</text:span><text:span text:style-name="T2">:</text:span> خطباتِ مدراس</text:p>
            </text:list-item>
            <text:list-item>
              <text:p text:style-name="P4"><text:span text:style-name="T1">صنفِ نثر</text:span><text:span text:style-name="T2">:</text:span> مقالہ / مضمون</text:p>
            </text:list-item>
          </text:list>
        </text:list-item>
        <text:list-item>
          <text:p text:style-name="P4"><text:span text:style-name="T1">سبق </text:span><text:span text:style-name="T2">2:</text:span> قحط الرجال</text:p>
          <text:list>
            <text:list-item>
              <text:p text:style-name="P4"><text:span text:style-name="T1">مصنف</text:span><text:span text:style-name="T2">:</text:span> مختار مسعود</text:p>
            </text:list-item>
            <text:list-item>
              <text:p text:style-name="P4"><text:span text:style-name="T1">ماخذ</text:span><text:span text:style-name="T2">/</text:span><text:span text:style-name="T1">کتاب</text:span><text:span text:style-name="T2">:</text:span> آوازِ دوست</text:p>
            </text:list-item>
            <text:list-item>
              <text:p text:style-name="P4"><text:span text:style-name="T1">صنفِ نثر</text:span><text:span text:style-name="T2">:</text:span> خاکہ نگاری / شخصیت نگاری</text:p>
            </text:list-item>
          </text:list>
        </text:list-item>
        <text:list-item>
          <text:p text:style-name="P4"><text:span text:style-name="T1">سبق </text:span><text:span text:style-name="T2">3:</text:span> عالم گیر کا انصاف</text:p>
          <text:list>
            <text:list-item>
              <text:p text:style-name="P4"><text:span text:style-name="T1">مصنف</text:span><text:span text:style-name="T2">:</text:span> علامہ شبلی نعمانی</text:p>
            </text:list-item>
            <text:list-item>
              <text:p text:style-name="P4"><text:span text:style-name="T1">ماخذ</text:span><text:span text:style-name="T2">/</text:span><text:span text:style-name="T1">کتاب</text:span><text:span text:style-name="T2">:</text:span> مقالاتِ شبلی</text:p>
            </text:list-item>
            <text:list-item>
              <text:p text:style-name="P4"><text:span text:style-name="T1">صنفِ نثر</text:span><text:span text:style-name="T2">:</text:span> تاریخی مضمون / حکایت</text:p>
            </text:list-item>
          </text:list>
        </text:list-item>
        <text:list-item>
          <text:p text:style-name="P4"><text:span text:style-name="T1">سبق </text:span><text:span text:style-name="T2">4:</text:span> سویرے جو کل آنکھ میری کھلی</text:p>
          <text:list>
            <text:list-item>
              <text:p text:style-name="P4"><text:span text:style-name="T1">مصنف</text:span><text:span text:style-name="T2">:</text:span> احمد شاہ پطرس بخاری</text:p>
            </text:list-item>
            <text:list-item>
              <text:p text:style-name="P4"><text:span text:style-name="T1">ماخذ</text:span><text:span text:style-name="T2">/</text:span><text:span text:style-name="T1">کتاب</text:span><text:span text:style-name="T2">:</text:span> مضامینِ پطرس</text:p>
            </text:list-item>
            <text:list-item>
              <text:p text:style-name="P4"><text:span text:style-name="T1">صنفِ نثر</text:span><text:span text:style-name="T2">:</text:span> طنز و مزاح / انشائیہ</text:p>
            </text:list-item>
          </text:list>
        </text:list-item>
      </text:list>
      <text:h text:style-name="P2" text:outline-level="2">حصہ دوم: حصہ نثر (اسباق کا خلاصہ اور ون لائنرز)</text:h>
      <text:h text:style-name="P5" text:outline-level="3">سبق 1: سیرتِ محمدی کی جامعیت (سید سلیمان ندوی)</text:h>
      <text:list text:style-name="L2">
        <text:list-item>
          <text:p text:style-name="P6"><text:span text:style-name="T1">آسان خلاصہ</text:span><text:span text:style-name="T2">:</text:span> دنیا میں ہر انسان کو زندگی گزارنے کے لیے ایک عملی نمونے (Role Model) کی ضرورت ہوتی ہے۔ صرف حضرت محمد ﷺ کی ذات ایسی ہے جس میں کائنات کے ہر انسان (امیر، غریب، حکمران، استاد) کے لیے رہنمائی موجود ہے، اسی کو "جامعیت" کہتے ہیں۔ عدی بن حاتم آپ ﷺ کا جلال دیکھ کر ڈر گئے تھے، لیکن جب <text:soft-page-break/>انہوں نے دیکھا کہ آپ ﷺ ایک غریب لونڈی کی فریاد سننے کے لیے گلی میں کھڑے ہو گئے، تو وہ سمجھ گئے کہ یہ بادشاہت نہیں بلکہ نبوت ہے اور اسلام لے آئے۔</text:p>
        </text:list-item>
        <text:list-item>
          <text:p text:style-name="P6"><text:span text:style-name="T1">ون لائنر نوٹس </text:span><text:span text:style-name="T2">(</text:span><text:span text:style-name="T1">رجسٹر پر لکھنے کے لیے</text:span><text:span text:style-name="T2">):</text:span></text:p>
          <text:list>
            <text:list-item>
              <text:p text:style-name="P6">مرکزی خیال: آپ ﷺ کی ذات ہر انسان کے لیے واحد مکمل عملی نمونہ ہے۔</text:p>
            </text:list-item>
            <text:list-item>
              <text:p text:style-name="P6">مالدار اور تاجر کے لیے اسوہ: تاجرِ مکہ۔</text:p>
            </text:list-item>
            <text:list-item>
              <text:p text:style-name="P6">غریب اور مظلوم کے لیے اسوہ: شعبِ ابی طالب کے محصور۔</text:p>
            </text:list-item>
            <text:list-item>
              <text:p text:style-name="P6">فاتح اور سپہ سالار کے لیے اسوہ: بدر و حنین اور فتحِ مکہ۔</text:p>
            </text:list-item>
            <text:list-item>
              <text:p text:style-name="P6">استاد اور معلم کے لیے اسوہ: صفّہ کی درس گاہ۔</text:p>
            </text:list-item>
            <text:list-item>
              <text:p text:style-name="P6">قاضی اور منصف کے لیے اسوہ: حجرِ اسود کی ثالثی کا فیصلہ۔</text:p>
            </text:list-item>
            <text:list-item>
              <text:p text:style-name="P6">کلیدی واقعہ: عدی بن حاتم کا غریب لونڈی کی فریاد پر آپ ﷺ کی عاجزی دیکھ کر اسلام لانا۔</text:p>
            </text:list-item>
            <text:list-item>
              <text:p text:style-name="P6">امتحانی کوٹیشن: دیگر انبیاء ایک جنس کی دکان کی طرح ہیں جبکہ حضور ﷺ اخلاق کا سب سے بڑا بازار ہیں۔</text:p>
            </text:list-item>
          </text:list>
        </text:list-item>
      </text:list>
      <text:h text:style-name="P5" text:outline-level="3">سبق 2: قحط الرجال (مختار مسعود)</text:h>
      <text:list text:style-name="L3">
        <text:list-item>
          <text:p text:style-name="P7"><text:span text:style-name="T1">آسان خلاصہ</text:span><text:span text:style-name="T2">:</text:span> "قحط الرجال" کا مطلب ہے مخلص، قابل اور بڑے انسانوں کا ختم ہو جانا۔ یہ ایک خاکہ ہے جس میں مصنف نے اپنے مخلص دوست اور پاکستان کے عظیم نامور ادیب احمد شاہ پطرس بخاری کی زندگی اور شخصیت کو خراجِ تحسین پیش کیا ہے۔ پطرس بخاری اقوامِ متحدہ (UN) میں پاکستان کے مستقل نمائندے بھی رہے۔ پطرس بخاری کی وفات پر مصنف بہت غمزدہ ہیں اور کہتے ہیں کہ اب زمین بانجھ ہو چکی ہے، ایسے قداور مخلص لوگ اب پیدا نہیں ہوتے۔</text:p>
        </text:list-item>
        <text:list-item>
          <text:p text:style-name="P7"><text:span text:style-name="T1">ون لائنر نوٹس </text:span><text:span text:style-name="T2">(</text:span><text:span text:style-name="T1">رجسٹر پر لکھنے کے لیے</text:span><text:span text:style-name="T2">):</text:span></text:p>
          <text:list>
            <text:list-item>
              <text:p text:style-name="P7">عنوان کا مطلب: قحطِ آدمیت / بڑے اور قابل لوگوں کی کمی۔</text:p>
            </text:list-item>
            <text:list-item>
              <text:p text:style-name="P7">مرکزی ہستی: احمد شاہ پطرس بخاری (مصنف کے دوست)۔</text:p>
            </text:list-item>
            <text:list-item>
              <text:p text:style-name="P7">پطرس کا بڑا عہدہ: اقوامِ متحدہ (UN) میں پاکستان کے مستقل نمائندے۔</text:p>
            </text:list-item>
            <text:list-item>
              <text:p text:style-name="P7">مقامِ ملاقات: لالہ زار (مصنف کا گھر یا دفتر)۔</text:p>
            </text:list-item>
            <text:list-item>
              <text:p text:style-name="P7">بنیادی دکھ: پطرس کی وفات کے بعد اب ایسے قد آور انسان پیدا ہونا بند ہو گئے ہیں۔</text:p>
            </text:list-item>
            <text:list-item>
              <text:p text:style-name="P7">امتحانی کوٹیشن: زمین بانجھ ہو گئی ہے، اب قحطِ رجال کا دور ہے۔</text:p>
            </text:list-item>
          </text:list>
        </text:list-item>
      </text:list>
      <text:h text:style-name="P5" text:outline-level="3"><text:soft-page-break/>سبق 3: عالم گیر کا انصاف (علامہ شبلی نعمانی)</text:h>
      <text:list text:style-name="L4">
        <text:list-item>
          <text:p text:style-name="P8"><text:span text:style-name="T1">آسان خلاصہ</text:span><text:span text:style-name="T2">:</text:span> مغل شہنشاہ اورنگزیب عالم گیر اپنی سلطنت اور سخت گیری کے لیے مشہور تھے، لیکن انصاف کے معاملے میں وہ اپنے اصولوں پر کبھی سمجھوتہ نہیں کرتے تھے۔ ایک غریب بڑھیا عالم گیر کی عدالت میں آتی ہے اور فریاد کرتی ہے کہ شاہی فوج کے ایک ہاتھی نے اس کے اکلوتے جوان بیٹے کو کچل کر مار ڈالا ہے۔ عالم گیر نے فوری طور پر مقدمے کی باقاعدہ تفتیش کا حکم دیا اور معاملہ قاضی (جج) کی عدالت میں گیا جہاں ثابت ہوا کہ بادشاہ ہو یا عام شہری، قانون سب کے لیے برابر ہے۔</text:p>
        </text:list-item>
        <text:list-item>
          <text:p text:style-name="P8"><text:span text:style-name="T1">ون لائنر نوٹس </text:span><text:span text:style-name="T2">(</text:span><text:span text:style-name="T1">رجسٹر پر لکھنے کے لیے</text:span><text:span text:style-name="T2">):</text:span></text:p>
          <text:list>
            <text:list-item>
              <text:p text:style-name="P8">مرکزی موضوع: اورنگزیب عالم گیر کا بے لاگ انصاف اور قانون کی بالادستی۔</text:p>
            </text:list-item>
            <text:list-item>
              <text:p text:style-name="P8">فریادی: ایک غریب اور بے بس بوڑھی عورت۔</text:p>
            </text:list-item>
            <text:list-item>
              <text:p text:style-name="P8">جرم اور واقعہ: شاہی ہاتھی کے پاؤں تلے بوڑھی عورت کے جوان بیٹے کا کچل جانا۔</text:p>
            </text:list-item>
            <text:list-item>
              <text:p text:style-name="P8">بادشاہ کا اصول: عدل و انصاف میں شاہ و گدا (بادشاہ اور فقیر) برابر ہیں۔</text:p>
            </text:list-item>
            <text:list-item>
              <text:p text:style-name="P8">مغل عدالتی نظام: قاضی کی عدالت مکمل آزاد تھی، بادشاہ بھی قانون کے تابع تھا۔</text:p>
            </text:list-item>
            <text:list-item>
              <text:p text:style-name="P8">نتیجہ اور فیصلہ: غریب عورت کو مکمل انصاف اور دیت (خون بہا) کی ادائیگی۔</text:p>
            </text:list-item>
            <text:list-item>
              <text:p text:style-name="P8">امتحانی کوٹیشن: حکومت کفر سے چل سکتی ہے، لیکن ظلم سے نہیں۔</text:p>
            </text:list-item>
          </text:list>
        </text:list-item>
      </text:list>
      <text:h text:style-name="P5" text:outline-level="3">سبق 4: سویرے جو کل آنکھ میری کھلی (پطرس بخاری)</text:h>
      <text:list text:style-name="L5">
        <text:list-item>
          <text:p text:style-name="P9"><text:span text:style-name="T1">آسان خلاصہ</text:span><text:span text:style-name="T2">:</text:span> مصنف (پطرس بخاری) کے امتحانات قریب ہیں اور وہ پڑھائی کے لیے صبح جلدی اٹھنا چاہتے ہیں۔ وہ اپنے پڑوسی "لالا سدھو" سے منتیں کرتے ہیں کہ مجھے صبح تڑکے 4 بجے ہر قیمت پر جگا دینا۔ صبح لالا سدھو سچ مچ جلدی آ جاتے ہیں اور دروازہ زور زور سے کھٹکھٹاتے ہیں۔ مصنف کی نیند خراب ہوتی ہے تو وہ اٹھنے کے بجائے دل ہی دل میں لالا کو کوستے ہیں اور کمبل تان کر دوبارہ سو جاتے ہیں۔ مصنف نے ان طلبہ کا مذاق اڑایا ہے جو امتحانات کے دنوں میں صبح جلدی اٹھ کر پڑھنے کے کھوکھلے منصوبے بناتے ہیں۔</text:p>
        </text:list-item>
        <text:list-item>
          <text:p text:style-name="P9"><text:span text:style-name="T1">ون لائنر نوٹس </text:span><text:span text:style-name="T2">(</text:span><text:span text:style-name="T1">رجسٹر پر لکھنے کے لیے</text:span><text:span text:style-name="T2">):</text:span></text:p>
          <text:list>
            <text:list-item>
              <text:p text:style-name="P9">مرکزی خیال: طلبہ کا امتحانات کے دنوں میں صبح جلدی اٹھنے کے کھوکھلے منصوبے بنانا۔</text:p>
            </text:list-item>
            <text:list-item>
              <text:p text:style-name="P9"><text:soft-page-break/>مددگار کردار: لالا سدھو (پڑوسی جو صبح جگانے کی ذمہ داری لیتا ہے)۔</text:p>
            </text:list-item>
            <text:list-item>
              <text:p text:style-name="P9">وقتِ بیداری: صبح کے ٹھیک 4 بجے۔</text:p>
            </text:list-item>
            <text:list-item>
              <text:p text:style-name="P9">مصنف کا ردِعمل: جاگنے کے بجائے لالا کو گالیاں دینا اور کمبل میں منہ چھپانا۔</text:p>
            </text:list-item>
            <text:list-item>
              <text:p text:style-name="P9">امتحانی کوٹیشن: "کون کہتا ہے کہ موت آئے گی تو سو نہ سکیں گے؟"</text:p>
            </text:list-item>
          </text:list>
        </text:list-item>
      </text:list>
      <text:h text:style-name="P2" text:outline-level="2">حصہ سوم: حصہ غزل (اشعار کی تشریح کے لیے)</text:h>
      <text:h text:style-name="P5" text:outline-level="3">1. میر تقی میر (خدائے سخن)</text:h>
      <text:list text:style-name="L6">
        <text:list-item>
          <text:p text:style-name="P10"><text:span text:style-name="T1">شاعری کا رنگ</text:span><text:span text:style-name="T2">:</text:span> حزن و ملال (بہت زیادہ اداسی)، درد و غم، دلی کی بربادی کا عکس۔</text:p>
        </text:list-item>
        <text:list-item>
          <text:p text:style-name="P10"><text:span text:style-name="T1">اشعار کی پہچان </text:span><text:span text:style-name="T2">(Keywords):</text:span> اشعار میں دل، جگر، رونے، داغ، چشم، آہ، اور بیداد (ظلم) جیسے الفاظ کثرت سے آئیں گے۔</text:p>
        </text:list-item>
        <text:list-item>
          <text:p text:style-name="P10"><text:span text:style-name="T1">امتحانی جادوئی جملہ</text:span><text:span text:style-name="T2">:</text:span> "میر کی شاعری دل سے نکلتی ہے اور دل پر اثر کرتی ہے، ان کے غم میں ایک سوز و گداز ہے۔"</text:p>
        </text:list-item>
      </text:list>
      <text:h text:style-name="P5" text:outline-level="3">2. مرزا اسد اللہ خان غالب</text:h>
      <text:list text:style-name="L7">
        <text:list-item>
          <text:p text:style-name="P11"><text:span text:style-name="T1">شاعری کا رنگ</text:span><text:span text:style-name="T2">:</text:span> فلسفیانہ انداز، شوخی و ظرافت (ہلکا مزاح)، گہری سوچ اور خودداری۔</text:p>
        </text:list-item>
        <text:list-item>
          <text:p text:style-name="P11"><text:span text:style-name="T1">اشعار کی پہچان </text:span><text:span text:style-name="T2">(Keywords):</text:span> اشعار میں ہستی، عدم، وحشت، تمنا، جنون، ہوس، اور آرزو جیسے بھاری الفاظ ملیں گے۔</text:p>
        </text:list-item>
        <text:list-item>
          <text:p text:style-name="P11"><text:span text:style-name="T1">امتحانی جادوئی جملہ</text:span><text:span text:style-name="T2">:</text:span> "غالب انسانی نفسیات اور کائنات کے حقائق کو فلسفیانہ مگر دلکش انداز میں بیان کرنے کے ماہر ہیں۔"</text:p>
        </text:list-item>
      </text:list>
      <text:h text:style-name="P5" text:outline-level="3">3. مومن خان مومن</text:h>
      <text:list text:style-name="L8">
        <text:list-item>
          <text:p text:style-name="P12"><text:span text:style-name="T1">شاعری کا رنگ</text:span><text:span text:style-name="T2">:</text:span> معاملہ بندی (محبوب سے گفتگو)، حسن و عشق کی باریکیاں، رندانہ مزاج۔</text:p>
        </text:list-item>
        <text:list-item>
          <text:p text:style-name="P12"><text:span text:style-name="T1">اشعار کی پہچان </text:span><text:span text:style-name="T2">(Keywords):</text:span> اشعار میں محبوب، غیر (رقیب)، گلا، عہد و پیماں، صنم، اور تم سلامت رہو جیسے کلمات ملیں گے۔</text:p>
        </text:list-item>
        <text:list-item>
          <text:p text:style-name="P12"><text:span text:style-name="T1">امتحانی جادوئی جملہ</text:span><text:span text:style-name="T2">:</text:span> "مومن کے ہاں پاکیزہ حسن و عشق کا بیان ہے اور وہ کم الفاظ میں بڑی بات کہنے کا فن جانتے ہیں۔"</text:p>
        </text:list-item>
      </text:list>
      <text:h text:style-name="P5" text:outline-level="3"><text:soft-page-break/>تشریح کا امتحانی فارمیٹ:</text:h>
      <text:list text:style-name="L9">
        <text:list-item>
          <text:p text:style-name="P13"><text:span text:style-name="T1">حوالۂ شاعر</text:span><text:span text:style-name="T2">:</text:span> شاعر کا نام اور ان کا لقب لکھیں۔</text:p>
        </text:list-item>
        <text:list-item>
          <text:p text:style-name="P13"><text:span text:style-name="T1">صنفِ سخن</text:span><text:span text:style-name="T2">:</text:span> غزل۔</text:p>
        </text:list-item>
        <text:list-item>
          <text:p text:style-name="P13"><text:span text:style-name="T1">مفہوم</text:span><text:span text:style-name="T2">:</text:span> شعر کا آسان ایک لائن میں مطلب۔</text:p>
        </text:list-item>
        <text:list-item>
          <text:p text:style-name="P13"><text:span text:style-name="T1">تشریح</text:span><text:span text:style-name="T2">:</text:span> اپنے الفاظ میں تفصیل (جس میں اوپر دیا گیا "امتحانی جادوئی جملہ" لازمی لکھیں)۔</text:p>
        </text:list-item>
      </text:list>
      <text:h text:style-name="P2" text:outline-level="2">حصہ چہارم: حصہ نظم (مرکزی خیال اور خلاصہ)</text:h>
      <text:h text:style-name="P5" text:outline-level="3">1. حمد (شاعر: مظفر وارثی)</text:h>
      <text:list text:style-name="L10">
        <text:list-item>
          <text:p text:style-name="P14"><text:span text:style-name="T1">مرکزی خیال</text:span><text:span text:style-name="T2">:</text:span> خدا کی ذات واحد ہے، وہی پوری کائنات کا خالق و مالک ہے اور اس کی رحمت ہر چیز پر غالب ہے۔</text:p>
        </text:list-item>
        <text:list-item>
          <text:p text:style-name="P14"><text:span text:style-name="T1">کلیدی الفاظ </text:span><text:span text:style-name="T2">(Keywords):</text:span> خدا، رحمت، خالق، ذات، کائنات، بندہ۔</text:p>
        </text:list-item>
        <text:list-item>
          <text:p text:style-name="P14"><text:span text:style-name="T1">امتحانی جادوئی جملہ</text:span><text:span text:style-name="T2">:</text:span> "مظفر وارثی نے انتہائی سادہ اور دلنشین الفاظ میں اللہ تعالیٰ کی ربوبیت اور بندے کی عاجزی کا نقشہ کھینچا ہے۔"</text:p>
        </text:list-item>
      </text:list>
      <text:h text:style-name="P5" text:outline-level="3">2. نعت (شاعر: محسن کاکوروی)</text:h>
      <text:list text:style-name="L11">
        <text:list-item>
          <text:p text:style-name="P15"><text:span text:style-name="T1">مرکزی خیال</text:span><text:span text:style-name="T2">:</text:span> آپ ﷺ کی ہستی وجہِ تخلیقِ کائنات ہے اور آپ ﷺ کا اسوۂ حسنہ پوری انسانیت کے لیے نجات کا راستہ ہے۔</text:p>
        </text:list-item>
        <text:list-item>
          <text:p text:style-name="P15"><text:span text:style-name="T1">کلیدی الفاظ </text:span><text:span text:style-name="T2">(Keywords):</text:span> مدینہ، رحمتِ عالم، نور، رسول، سرورِ انبیاء، امتی۔</text:p>
        </text:list-item>
        <text:list-item>
          <text:p text:style-name="P15"><text:span text:style-name="T1">امتحانی جادوئی جملہ</text:span><text:span text:style-name="T2">:</text:span> "محسن کاکوروی کے الفاظ سے حضور ﷺ کے لیے سچی عقیدت اور محبت کا اظہار ہوتا ہے جو نعت کا اصل روح ہے۔"</text:p>
        </text:list-item>
      </text:list>
      <text:h text:style-name="P5" text:outline-level="3">3. چاند اور تارے (شاعر: علامہ اقبال)</text:h>
      <text:list text:style-name="L12">
        <text:list-item>
          <text:p text:style-name="P16"><text:span text:style-name="T1">مرکزی خیال</text:span><text:span text:style-name="T2">:</text:span> عمل اور مسلسل حرکت ہی زندگی کی علامت ہے، جو قومیں سست ہو کر رک جاتی ہیں وہ ختم ہو جاتی ہیں۔</text:p>
        </text:list-item>
        <text:list-item>
          <text:p text:style-name="P16"><text:span text:style-name="T1">کلیدی الفاظ </text:span><text:span text:style-name="T2">(Keywords):</text:span> چاند، تارے، سفر، حرکت، سکون، محنت، زندگی۔</text:p>
        </text:list-item>
        <text:list-item>
          <text:p text:style-name="P16"><text:span text:style-name="T1">امتحانی جادوئی جملہ</text:span><text:span text:style-name="T2">:</text:span> "اقبال نے چاند اور ستاروں کے استعارے سے نوجوانوں کو عملِ پیہم (مسلسل محنت) اور آگے بڑھنے کا درس دیا ہے۔"</text:p>
        </text:list-item>
      </text:list>
      <text:h text:style-name="P2" text:outline-level="2"><text:soft-page-break/>حصہ پنجم: حصہ قواعد (اردو گرائمر)</text:h>
      <text:h text:style-name="P5" text:outline-level="3">1. امدادی افعال (Helping Verbs)</text:h>
      <text:list text:style-name="L13">
        <text:list-item>
          <text:p text:style-name="P17"><text:span text:style-name="T1">تعریف</text:span><text:span text:style-name="T2">:</text:span> ایسے افعال جو اصل فعل کے ساتھ مل کر جملے کے معنی میں زور یا خوبصورتی پیدا کرتے ہیں۔ امدادی فعل ہمیشہ جملے کے <text:span text:style-name="T1">بالکل آخر میں</text:span> آتا ہے۔</text:p>
        </text:list-item>
        <text:list-item>
          <text:p text:style-name="P17"><text:span text:style-name="T1">اہم امتحانی مثالیں</text:span><text:span text:style-name="T2">:</text:span></text:p>
          <text:list>
            <text:list-item>
              <text:p text:style-name="P17">لینا: اس نے اپنا کام ختم <text:span text:style-name="T1">کر لیا</text:span>۔</text:p>
            </text:list-item>
            <text:list-item>
              <text:p text:style-name="P17">دینا: استاد نے بچے کو رول نمبر سلپ <text:span text:style-name="T1">دے دی</text:span>۔</text:p>
            </text:list-item>
            <text:list-item>
              <text:p text:style-name="P17">جانا: امتحانی وقت ختم ہوتے ہی سب طلبہ <text:span text:style-name="T1">چلے گئے</text:span>۔</text:p>
            </text:list-item>
            <text:list-item>
              <text:p text:style-name="P17">آنا: بادل گرجے تو زور دار بارش <text:span text:style-name="T1">ہو آئی</text:span>۔</text:p>
            </text:list-item>
            <text:list-item>
              <text:p text:style-name="P17">پڑنا: اچانک خبر سن کر اسے کراچی <text:span text:style-name="T1">جانا پڑا</text:span>۔</text:p>
            </text:list-item>
          </text:list>
        </text:list-item>
      </text:list>
      <text:h text:style-name="P5" text:outline-level="3">2. رموزِ اوقاف (Punctuation Marks)</text:h>
      <text:list text:style-name="L14">
        <text:list-item>
          <text:p text:style-name="P18"><text:span text:style-name="T1">سکتہ </text:span><text:span text:style-name="T2">( , ):</text:span> جملے میں سب سے کم ٹھہراؤ کے لیے۔ (مثال: اسلم، اکرم اور علی اچھے دوست ہیں)۔</text:p>
        </text:list-item>
        <text:list-item>
          <text:p text:style-name="P18"><text:span text:style-name="T1">وقفہ </text:span><text:span text:style-name="T2">( ; ):</text:span> سکتہ سے زیادہ ٹھہراؤ کے لیے۔ (مثال: جو بوؤ گے؛ وہی کاٹو گے)۔</text:p>
        </text:list-item>
        <text:list-item>
          <text:p text:style-name="P18"><text:span text:style-name="T1">رابطہ </text:span><text:span text:style-name="T2">( : ):</text:span> کسی قول یا تفصیل سے پہلے۔ (مثال: فرمانِ نبوی ہے: صفائی نصف ایمان ہے)۔</text:p>
        </text:list-item>
        <text:list-item>
          <text:p text:style-name="P18"><text:span text:style-name="T1">ختمہ </text:span><text:span text:style-name="T2">( . ):</text:span> جملے کے مکمل خاتمے پر۔ (مثال: میں نے اردو کی تیاری مکمل کر لی ہے)۔</text:p>
        </text:list-item>
      </text:list>
      <text:h text:style-name="P5" text:outline-level="3">3. درخواست نگاری کا معیاری خاکہ</text:h>
      <text:p text:style-name="P3">بخدمت جناب پرنسپل، گورنمنٹ کامرس کالج، کراچی۔</text:p>
      <text:p text:style-name="P3">عنوان: درخواست برائے حصولِ کالج چھوڑنے کا سرٹیفکیٹ</text:p>
      <text:p text:style-name="P3">جنابِ عالی، انتہائی ادب سے گزارش ہے کہ۔۔۔ (یہاں درمیان میں تین سطروں میں اپنا مسئلہ لکھیں)۔</text:p>
      <text:p text:style-name="P3">عین نوازش ہوگی۔</text:p>
      <text:p text:style-name="P3">العارض، آپ کا فرمانبردار شاگرد، الف۔ ب۔ ج تاریخ: 29 جون 2026</text:p>
      <text:p text:style-name="P1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ejaVu Sans" svg:font-family="'DejaVu Sans'"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chapter">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6-29T03:26:52.266779923</meta:creation-date>
    <dc:date>2026-06-29T03:37:14.137331588</dc:date>
    <meta:editing-duration>PT10M23S</meta:editing-duration>
    <meta:editing-cycles>1</meta:editing-cycles>
    <meta:document-statistic meta:table-count="0" meta:image-count="0" meta:object-count="0" meta:page-count="6" meta:paragraph-count="110" meta:word-count="1677" meta:character-count="7714" meta:non-whitespace-character-count="6230"/>
    <meta:generator>LibreOffice/26.2.4.2$Linux_X86_64 LibreOffice_project/3346a99e6b841765b75a9b29714a5b95c6761ce3</meta:generator>
  </office:meta>
</office:document-meta>
</file>